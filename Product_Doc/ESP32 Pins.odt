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600000267143293A44A19227E.png" manifest:media-type="image/png"/>
  <manifest:file-entry manifest:full-path="Pictures/10000001000002AC000002768C293C6C9E15C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-0.042cm" svg:width="17.59cm" svg:height="16.2cm" draw:z-index="0"><draw:image xlink:href="Pictures/10000001000002AC000002768C293C6C9E15CE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14.552cm" svg:height="16.272cm" draw:z-index="1"><draw:image xlink:href="Pictures/100000010000022600000267143293A44A19227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5:59:20.104109394</meta:creation-date>
    <meta:print-date>2023-12-12T16:03:28.333180359</meta:print-date>
    <dc:date>2023-12-12T16:03:55.369292943</dc:date>
    <meta:editing-duration>PT4M36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